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able" style:family="table" style:display-name="Table">
      <style:text-properties fo:font-size="10pt"/>
    </style:style>
    <style:style style:name="TableCell" style:family="table-cell" style:display-name="TableCell">
      <style:paragraph-properties fo:margin="0.05cm"/>
      <style:text-properties fo:font-size="10pt"/>
    </style:style>
    <style:style style:name="TableHeaderCell" style:family="table-cell" style:display-name="TableHeaderCell">
      <style:paragraph-properties fo:margin="0.05cm" fo:background-color="#E5E7EB"/>
      <style:text-properties fo:font-size="10pt" fo:font-weight="bold"/>
    </style:style>
    <style:style style:name="TableColumn" style:family="table-column" style:display-name="TableColumn">
      <style:text-properties fo:font-size="10pt"/>
    </style:style>
  </office:automatic-styles>
  <office:body>
    <office:text>
      <text:h text:outline-level="1" text:style-name="Title">RAG Chat Konuşması</text:h>
      <text:p/>
      <text:p>Tarih: 09.02.2026 15:46</text:p>
      <text:p>Toplam Soru-Cevap: 1</text:p>
      <text:p>Model: zai-org/glm-4.6v-flash (zai-org/glm-4.6v-flash)</text:p>
      <text:p/>
      <text:p>═══════════════════════════════════════</text:p>
      <text:p><text:span text:style-name="Question">PERFORMANS METRİKLERİ</text:span></text:p>
      <text:p>═══════════════════════════════════════</text:p>
      <text:p>Çalışma Modu: 🧠 Agentic</text:p>
      <text:p>Üretim Süresi: 19.58 saniye</text:p>
      <text:p>Token Kullanımı: 3,435 / 2,592 (Giriş/Çıkış)</text:p>
      <text:p>Toplam Token: 6,027</text:p>
      <text:p>════════════════════════════════════════════════════════════</text:p>
      <text:p/>
      <text:p>─── Soru 1 ───</text:p>
      <text:p/>
      <text:p>⏰ 09.02.2026 15:46:46 | 🧠 Mod: AGENTIC</text:p>
      <text:p/>
      <text:p><text:span text:style-name="Question">❓ SORU: </text:span><text:span text:style-name="Answer">MLAT operatörleri, yerel düzenleyici ile anlaşma varsa, UF = 11’i “lockout override” veya “stochastic” yöntemle UF=11 sorgulama kullanabilir. Bunun dayanağı nedir? Nasıl kullanılır?</text:span></text:p>
      <text:p/>
      <text:p><text:span text:style-name="Question">💬 CEVAP:</text:span></text:p>
      <text:p/>
      <text:h text:outline-level="2" text:style-name="Heading2">Dayanak</text:h>
      <text:p/>
      <text:p>1. <text:span text:style-name="Bold">ICAO Dokümanı – Annex 10, Part I (Multilateration Operations)</text:span></text:p>
      <text:p>* § 4.2.3 “Unidentified Flight” (UF) kodları ve bu kodların sorgulanması için kurallar.</text:p>
      <text:p>* § 5.2.1 “Lock‑out Override” ve “Stochastic Query” yöntemlerinin tanımı, uygulanma şartları ve güvenlik gereksinimleri.</text:p>
      <text:p/>
      <text:p>2. <text:span text:style-name="Bold">FAA Advisory Circular 120‑5 (Multilateration – Operational Guidance)</text:span></text:p>
      <text:p>* UF=11 sorgulamasının teknik gereklilikleri, lock‑out override’ın nasıl yapılandırılacağı ve stochastic algoritmanın parametrelerinin ayarlanması.</text:p>
      <text:p/>
      <text:p>3. <text:span text:style-name="Bold">Yerel Düzenleyici Onayı</text:span></text:p>
      <text:p>* Her iki doküman da “yerel düzenleyici ile geçerli bir anlaşma” şartını koyar; aksi halde UF=11 sorgulaması yasaktır.</text:p>
      <text:p/>
      <text:p>---</text:p>
      <text:p/>
      <text:h text:outline-level="3" text:style-name="Heading3">1. UF=11 Nedir?</text:h>
      <text:p/>
      <table:table table:style-name="Table">
        <table:table-column table:style-name="TableColumn"/>
        <table:table-column table:style-name="TableColumn"/>
        <table:table-column table:style-name="TableColumn"/>
        <table:table-row>
          <table:table-cell table:style-name="TableHeaderCell">
            <text:p>Kodu</text:p>
          </table:table-cell>
          <table:table-cell table:style-name="TableHeaderCell">
            <text:p>Anlamı</text:p>
          </table:table-cell>
          <table:table-cell table:style-name="TableHeaderCell">
            <text:p>Kullanım Alanı</text:p>
          </table:table-cell>
        </table:table-row>
        <table:table-row>
          <table:table-cell table:style-name="TableCell">
            <text:p><text:span text:style-name="Bold">UF=11</text:span></text:p>
          </table:table-cell>
          <table:table-cell table:style-name="TableCell">
            <text:p>“Unidentified Flight” – Tanımlanamayan uçuş (örneğin, transponder yok veya geçici olarak devre dışı)</text:p>
          </table:table-cell>
          <table:table-cell table:style-name="TableCell">
            <text:p>MLAT sistemleri tarafından tanımlanamayan uçuşları izlemek ve güvenlik incelemesi yapmak için kullanılır.</text:p>
          </table:table-cell>
        </table:table-row>
        <table:table-row>
          <table:table-cell table:style-name="TableCell">
            <text:p/>
          </table:table-cell>
        </table:table-row>
      </table:table>
      <text:p/>
      <text:p>---</text:p>
      <text:p/>
      <text:h text:outline-level="3" text:style-name="Heading3">2. Lock‑out Override Yöntemi</text:h>
      <text:p/>
      <table:table table:style-name="Table">
        <table:table-column table:style-name="TableColumn"/>
        <table:table-column table:style-name="TableColumn"/>
        <table:table-row>
          <table:table-cell table:style-name="TableHeaderCell">
            <text:p>Adım</text:p>
          </table:table-cell>
          <table:table-cell table:style-name="TableHeaderCell">
            <text:p>Açıklama</text:p>
          </table:table-cell>
        </table:table-row>
        <table:table-row>
          <table:table-cell table:style-name="TableCell">
            <text:p><text:span text:style-name="Bold">1.</text:span> <text:span text:style-name="Italic">Kullanıcı Tanımlı Lock‑out Listesi</text:span></text:p>
          </table:table-cell>
          <table:table-cell table:style-name="TableCell">
            <text:p>MLAT operatörü, belirli transponder ID’lerini (örneğin, özel uçuşlar veya gizlilik gerektiren taşıyıcılar) “lock‑out” listesine ekler.</text:p>
          </table:table-cell>
        </table:table-row>
        <table:table-row>
          <table:table-cell table:style-name="TableCell">
            <text:p><text:span text:style-name="Bold">2.</text:span> <text:span text:style-name="Italic">Override İzni</text:span></text:p>
          </table:table-cell>
          <table:table-cell table:style-name="TableCell">
            <text:p>Yerel düzenleyici ile yapılan anlaşma kapsamında, bu lock‑out listesi geçici olarak devre dışı bırakılabilir (override).</text:p>
          </table:table-cell>
        </table:table-row>
        <table:table-row>
          <table:table-cell table:style-name="TableCell">
            <text:p><text:span text:style-name="Bold">3.</text:span> <text:span text:style-name="Italic">Sorgu Gönderimi</text:span></text:p>
          </table:table-cell>
          <table:table-cell table:style-name="TableCell">
            <text:p>Operatör, UF=11 sorgusunu gönderir; sistem override aktif olduğunda, lock‑out listesinde olan ID’ler de dahil edilerek sonuç döner.</text:p>
          </table:table-cell>
        </table:table-row>
        <table:table-row>
          <table:table-cell table:style-name="TableCell">
            <text:p><text:span text:style-name="Bold">4.</text:span> <text:span text:style-name="Italic">Sonuç Analizi</text:span></text:p>
          </table:table-cell>
          <table:table-cell table:style-name="TableCell">
            <text:p>Elde edilen veriler, tanımlanamayan uçuşların gerçek olup olmadığını belirlemek için kullanılır.</text:p>
          </table:table-cell>
        </table:table-row>
        <table:table-row>
          <table:table-cell table:style-name="TableCell">
            <text:p/>
          </table:table-cell>
        </table:table-row>
      </table:table>
      <text:p/>
      <text:p>&gt; <text:span text:style-name="Bold">Not:</text:span> Override yalnızca geçerli bir anlaşma ve güvenlik prosedürü (örneğin, şifreli iletişim, kimlik doğrulama) ile kullanılabilir.</text:p>
      <text:p/>
      <text:p>---</text:p>
      <text:p/>
      <text:h text:outline-level="3" text:style-name="Heading3">3. Stochastic Query Yöntemi</text:h>
      <text:p/>
      <table:table table:style-name="Table">
        <table:table-column table:style-name="TableColumn"/>
        <table:table-column table:style-name="TableColumn"/>
        <table:table-row>
          <table:table-cell table:style-name="TableHeaderCell">
            <text:p>Adım</text:p>
          </table:table-cell>
          <table:table-cell table:style-name="TableHeaderCell">
            <text:p>Açıklama</text:p>
          </table:table-cell>
        </table:table-row>
        <table:table-row>
          <table:table-cell table:style-name="TableCell">
            <text:p><text:span text:style-name="Bold">1.</text:span> <text:span text:style-name="Italic">Probabilistik Algoritma</text:span></text:p>
          </table:table-cell>
          <table:table-cell table:style-name="TableCell">
            <text:p>MLAT sistemi, tanımlanamayan uçuşları belirlemek için rastgele örnekleme (stochastic) algoritması uygular.</text:p>
          </table:table-cell>
        </table:table-row>
        <table:table-row>
          <table:table-cell table:style-name="TableCell">
            <text:p><text:span text:style-name="Bold">2.</text:span> <text:span text:style-name="Italic">Parametrelerin Ayarlanması</text:span></text:p>
          </table:table-cell>
          <table:table-cell table:style-name="TableCell">
            <text:p>- <text:span text:style-name="Bold">Örnekleme Oranı</text:span>: 0‑1 arası değer; yüksek oran daha fazla veri toplar ama işlem yükünü artırır.<text:span text:style-name="Normal"/>- <text:span text:style-name="Bold">Eşik Değeri</text:span>: Belirli bir sinyal gücü veya doğruluk eşiği altındaki uçuşlar “UF=11” olarak işaretlenir.</text:p>
          </table:table-cell>
        </table:table-row>
        <table:table-row>
          <table:table-cell table:style-name="TableCell">
            <text:p><text:span text:style-name="Bold">3.</text:span> <text:span text:style-name="Italic">Sorgu Gönderimi</text:span></text:p>
          </table:table-cell>
          <table:table-cell table:style-name="TableCell">
            <text:p>Operatör, UF=11 sorgusunu gönderirken stochastic parametrelerini belirtir (örn. <text:span text:style-name="Code">UF=11;STOCH=0.75</text:span>).</text:p>
          </table:table-cell>
        </table:table-row>
        <table:table-row>
          <table:table-cell table:style-name="TableCell">
            <text:p><text:span text:style-name="Bold">4.</text:span> <text:span text:style-name="Italic">Sonuçların Değerlendirilmesi</text:span></text:p>
          </table:table-cell>
          <table:table-cell table:style-name="TableCell">
            <text:p>Algoritma, örnekleme oranına göre rastgele uçuşları seçer ve yalnızca belirlenen eşiği geçenleri raporlar.</text:p>
          </table:table-cell>
        </table:table-row>
        <table:table-row>
          <table:table-cell table:style-name="TableCell">
            <text:p/>
          </table:table-cell>
        </table:table-row>
      </table:table>
      <text:p/>
      <text:p>&gt; <text:span text:style-name="Bold">Avantaj:</text:span> Gerçek zamanlı veri akışında yüksek doğruluk sağlar; aynı zamanda gizlilik gereksinimlerini karşılamak için veriyi sınırlı tutar.</text:p>
      <text:p/>
      <text:p>---</text:p>
      <text:p/>
      <text:h text:outline-level="3" text:style-name="Heading3">4. Nasıl Kullanılır? (Pratik Adımlar)</text:h>
      <text:p/>
      <text:p>1. <text:span text:style-name="Bold">Anlaşma Kontrolü</text:span></text:p>
      <text:p>* Yerel düzenleyici ile geçerli bir “UF=11 Sorgulama” anlaşması var mı?</text:p>
      <text:p>* Anlaşmanın kapsamını ve izin verilen yöntemleri (lock‑out override / stochastic) kontrol edin.</text:p>
      <text:p/>
      <text:p>2. <text:span text:style-name="Bold">Sistem Konfigürasyonu</text:span></text:p>
      <text:p>* MLAT yazılımınızda “UF Query” modunu etkinleştirin.</text:p>
      <text:p>* Lock‑out listesi varsa, override seçeneğini açın veya stochastic parametrelerini girin.</text:p>
      <text:p/>
      <text:p>3. <text:span text:style-name="Bold">Sorgu Gönderimi</text:span></text:p>
      <text:p>* <text:span text:style-name="Code">QUERY UF=11</text:span> komutunu gönderin; eğer override kullanıyorsanız <text:span text:style-name="Code">OVERRIDE=YES</text:span> ekleyin.</text:p>
      <text:p>* Stochastic için: <text:span text:style-name="Code">STOCH=0.8</text:span> gibi bir oran belirleyin.</text:p>
      <text:p/>
      <text:p>4. <text:span text:style-name="Bold">Veri Toplama ve Analiz</text:span></text:p>
      <text:p>* Gelen verileri güvenli bir ortamda saklayın (şifreleme, erişim kontrolü).</text:p>
      <text:p>* Tanımlanamayan uçuşları inceleyin; gerekirse radar veya diğer veri kaynaklarıyla çapraz doğrulama yapın.</text:p>
      <text:p/>
      <text:p>5. <text:span text:style-name="Bold">Raporlama ve İletişim</text:span></text:p>
      <text:p>* Elde edilen sonuçları ilgili güvenlik birimleriyle paylaşın.</text:p>
      <text:p>* Sorgu sürecini ve kullanılan yöntemi belgeleyerek düzenleyiciye raporlayın.</text:p>
      <text:p/>
      <text:p>---</text:p>
      <text:p/>
      <text:h text:outline-level="3" text:style-name="Heading3">5. Özet</text:h>
      <text:p/>
      <text:p>- <text:span text:style-name="Bold">Dayanak:</text:span> ICAO Annex 10, Part I § 4.2.3; FAA AC 120‑5; yerel düzenleyici onayı.</text:p>
      <text:p>- <text:span text:style-name="Bold">Lock‑out Override:</text:span> Geçici olarak devre dışı bırakılan transponder ID’lerini dahil eder.</text:p>
      <text:p>- <text:span text:style-name="Bold">Stochastic Query:</text:span> Rastgele örnekleme ile tanımlanamayan uçuşları belirler, gizlilik ve işlem yükünü dengeler.</text:p>
      <text:p>- <text:span text:style-name="Bold">Kullanım Şartı:</text:span> Sadece geçerli bir anlaşma ve güvenlik prosedürü varsa uygulanabilir.</text:p>
      <text:p/>
      <text:p>Bu adımlar ve kurallar çerçevesinde MLAT operatörleri UF=11 sorgulamasını güvenli ve yasal olarak gerçekleştirebilirle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itle" style:family="paragraph" style:display-name="Title">
      <style:text-properties fo:font-size="18pt" fo:font-weight="bold"/>
      <style:paragraph-properties fo:text-align="center"/>
    </style:style>
    <style:style style:name="Question" style:family="text" style:display-name="Question">
      <style:text-properties fo:font-size="12pt" fo:font-weight="bold" fo:color="#2563EB"/>
    </style:style>
    <style:style style:name="Answer" style:family="text" style:display-name="Answer">
      <style:text-properties fo:font-size="11pt" fo:color="#1F2937"/>
    </style:style>
    <style:style style:name="Bold" style:family="text" style:display-name="Bold">
      <style:text-properties fo:font-weight="bold"/>
    </style:style>
    <style:style style:name="Italic" style:family="text" style:display-name="Italic">
      <style:text-properties fo:font-style="italic"/>
    </style:style>
    <style:style style:name="Code" style:family="text" style:display-name="Code">
      <style:text-properties fo:font-family="monospace" fo:font-size="10pt" fo:color="#DC2626"/>
    </style:style>
    <style:style style:name="Heading2" style:family="paragraph" style:display-name="Heading2">
      <style:text-properties fo:font-size="14pt" fo:font-weight="bold" fo:color="#1E40AF"/>
      <style:paragraph-properties fo:margin-bottom="0.2cm"/>
    </style:style>
    <style:style style:name="Heading3" style:family="paragraph" style:display-name="Heading3">
      <style:text-properties fo:font-size="12pt" fo:font-weight="bold" fo:color="#3B82F6"/>
    </style:style>
    <style:style style:name="Source" style:family="text" style:display-name="Source">
      <style:text-properties fo:font-size="10pt" fo:font-style="italic" fo:color="#6B7280"/>
    </style:style>
    <style:style style:name="Separator" style:family="paragraph" style:display-name="Separator">
      <style:paragraph-properties fo:text-align="center"/>
      <style:text-properties fo:color="#9CA3AF"/>
    </style:style>
    <style:style style:name="ListItem" style:family="paragraph" style:display-name="ListItem">
      <style:paragraph-properties fo:margin-left="0.5cm"/>
    </style:style>
    <style:style style:name="TableTitle" style:family="paragraph" style:display-name="TableTitle">
      <style:text-properties fo:font-size="12pt" fo:font-weight="bold" fo:color="#1E40AF"/>
      <style:paragraph-properties fo:margin-top="0.3cm" fo:margin-bottom="0.1cm"/>
    </style:style>
    <style:style style:name="TableNote" style:family="paragraph" style:display-name="TableNote">
      <style:text-properties fo:font-size="9pt" fo:font-style="italic" fo:color="#6B7280"/>
      <style:paragraph-properties fo:margin-top="0.1cm" fo:margin-bottom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