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automatic-styles>
    <style:style style:name="Table" style:family="table" style:display-name="Table">
      <style:text-properties fo:font-size="10pt"/>
    </style:style>
    <style:style style:name="TableCell" style:family="table-cell" style:display-name="TableCell">
      <style:paragraph-properties fo:margin="0.05cm"/>
      <style:text-properties fo:font-size="10pt"/>
    </style:style>
    <style:style style:name="TableHeaderCell" style:family="table-cell" style:display-name="TableHeaderCell">
      <style:paragraph-properties fo:margin="0.05cm" fo:background-color="#E5E7EB"/>
      <style:text-properties fo:font-size="10pt" fo:font-weight="bold"/>
    </style:style>
    <style:style style:name="TableColumn" style:family="table-column" style:display-name="TableColumn">
      <style:text-properties fo:font-size="10pt"/>
    </style:style>
  </office:automatic-styles>
  <office:body>
    <office:text>
      <text:h text:outline-level="1" text:style-name="Title">RAG Chat Konuşması</text:h>
      <text:p/>
      <text:p>Tarih: 09.02.2026 16:32</text:p>
      <text:p>Toplam Soru-Cevap: 1</text:p>
      <text:p>Model: gpt-oss-20b (gpt-oss-20b)</text:p>
      <text:p/>
      <text:p>═══════════════════════════════════════</text:p>
      <text:p><text:span text:style-name="Question">PERFORMANS METRİKLERİ</text:span></text:p>
      <text:p>═══════════════════════════════════════</text:p>
      <text:p>Çalışma Modu: 🧠 Agentic</text:p>
      <text:p>Üretim Süresi: 36.92 saniye</text:p>
      <text:p>Token Kullanımı: 16,511 / 3,809 (Giriş/Çıkış)</text:p>
      <text:p>Toplam Token: 20,320</text:p>
      <text:p>════════════════════════════════════════════════════════════</text:p>
      <text:p/>
      <text:p>─── Soru 1 ───</text:p>
      <text:p/>
      <text:p>⏰ 09.02.2026 16:32:01 | 🧠 Mod: AGENTIC</text:p>
      <text:p/>
      <text:p><text:span text:style-name="Question">❓ SORU: </text:span><text:span text:style-name="Answer">Mode-S'in yapısı, teknik bileşenleri ile ilgili olarak kapsamlı bir özet hazırla</text:span></text:p>
      <text:p/>
      <text:p><text:span text:style-name="Source">📚 KAYNAKLAR:</text:span></text:p>
      <text:p><text:span text:style-name="Source">  • ED-102B.pdf (Sayfa 1291) - Benzerlik: 0.546</text:span></text:p>
      <text:p><text:span text:style-name="Source">  • ED-102B.pdf (Sayfa 1326) - Benzerlik: 0.544</text:span></text:p>
      <text:p><text:span text:style-name="Source">  • ED-102B.pdf (Sayfa 307) - Benzerlik: 0.542</text:span></text:p>
      <text:p><text:span text:style-name="Source">  • ED-102B.pdf (Sayfa 1311) - Benzerlik: 0.541</text:span></text:p>
      <text:p><text:span text:style-name="Source">  • EUROCONTROL_Mode_S_Course_Complete.pdf (Sayfa 183) - Benzerlik: 0.538</text:span></text:p>
      <text:p><text:span text:style-name="Source">  • ED-102B.pdf (Sayfa 29) - Benzerlik: 0.538</text:span></text:p>
      <text:p><text:span text:style-name="Source">  • ED-73F - MOPS for Secondary Surveillance Radar Mode S.pdf (Sayfa 14) - Benzerlik: 0.536</text:span></text:p>
      <text:p><text:span text:style-name="Source">  • 9688_cons_en.pdf (Sayfa 28) - Benzerlik: 0.533</text:span></text:p>
      <text:p><text:span text:style-name="Source">  • ED-102B.pdf (Sayfa 1287) - Benzerlik: 0.528</text:span></text:p>
      <text:p><text:span text:style-name="Source">  • book-the_1090mhz_riddle-junzi_sun.pdf (Sayfa 8) - Benzerlik: 0.528</text:span></text:p>
      <text:p><text:span text:style-name="Source">  • ED-102B.pdf (Sayfa 14) - Benzerlik: 0.528</text:span></text:p>
      <text:p><text:span text:style-name="Source">  • ED-102B.pdf (Sayfa 1300) - Benzerlik: 0.526</text:span></text:p>
      <text:p><text:span text:style-name="Source">  • ED-102B.pdf (Sayfa 1306) - Benzerlik: 0.525</text:span></text:p>
      <text:p><text:span text:style-name="Source">  • ED-102B.pdf (Sayfa 1305) - Benzerlik: 0.524</text:span></text:p>
      <text:p><text:span text:style-name="Source">  • ED-102B.pdf (Sayfa 1307) - Benzerlik: 0.524</text:span></text:p>
      <text:p><text:span text:style-name="Source">  • ED-102B.pdf (Sayfa 22) - Benzerlik: 0.524</text:span></text:p>
      <text:p><text:span text:style-name="Source">  • 9688_cons_en.pdf (Sayfa 32) - Benzerlik: 0.523</text:span></text:p>
      <text:p><text:span text:style-name="Source">  • DO260-C.pdf (Sayfa 27) - Benzerlik: 0.523</text:span></text:p>
      <text:p><text:span text:style-name="Source">  • ED-102B.pdf (Sayfa 287) - Benzerlik: 0.523</text:span></text:p>
      <text:p><text:span text:style-name="Source">  • 9688_cons_en.pdf (Sayfa 30) - Benzerlik: 0.523</text:span></text:p>
      <text:p/>
      <text:p><text:span text:style-name="Question">💬 CEVAP:</text:span></text:p>
      <text:p/>
      <text:h text:outline-level="2" text:style-name="Heading2">Mode‑S (1090 MHz) – Yapı ve Teknik Bileşenlerin Kapsamlı Özeti</text:h>
      <text:p/>
      <table:table table:style-name="Table">
        <table:table-column table:style-name="TableColumn"/>
        <table:table-column table:style-name="TableColumn"/>
        <table:table-row>
          <table:table-cell table:style-name="TableHeaderCell">
            <text:p>Konu</text:p>
          </table:table-cell>
          <table:table-cell table:style-name="TableHeaderCell">
            <text:p>Açıklama</text:p>
          </table:table-cell>
        </table:table-row>
        <table:table-row>
          <table:table-cell table:style-name="TableCell">
            <text:p><text:span text:style-name="Bold">Temel Mesaj Formatı</text:span></text:p>
          </table:table-cell>
          <table:table-cell table:style-name="TableCell">
            <text:p>112 bitlik bir mesaj; <text:span text:style-name="Normal"/>• <text:span text:style-name="Bold">DF (Downlink Format)</text:span>: 5 bit, mesaj tipini belirler (10/11 SSR yanıtları, 17/18 Extended Squitter).<text:span text:style-name="Normal"/>• <text:span text:style-name="Bold">CA (Capability/Address)</text:span>: 2 bit, transponderun yeteneklerini gösterir.<text:span text:style-name="Normal"/>• <text:span text:style-name="Bold">AC (Aircraft Address)</text:span>: 24 bit, benzersiz ICAO adresi. <text:span text:style-name="Normal"/>• <text:span text:style-name="Bold">Payload</text:span>: 56–58 bit; içerik mesaj tipine göre değişir.<text:span text:style-name="Normal"/>• <text:span text:style-name="Bold">Parity</text:span>: 24 bit, CRC‑based hata kontrolü.</text:p>
          </table:table-cell>
        </table:table-row>
        <table:table-row>
          <table:table-cell table:style-name="TableCell">
            <text:p><text:span text:style-name="Bold">Mesaj Türleri</text:span></text:p>
          </table:table-cell>
          <table:table-cell table:style-name="TableCell">
            <text:p>• <text:span text:style-name="Bold">SSR Yanıtları (DF = 10/11)</text:span> – “All‑call” ve “Selective” yanıtlar; <text:span text:style-name="Normal"/>• <text:span text:style-name="Bold">Extended Squitter (ES) (DF = 17/18)</text:span> – ADS‑B, Mode‑S State Vector, Target Status mesajları.</text:p>
          </table:table-cell>
        </table:table-row>
        <table:table-row>
          <table:table-cell table:style-name="TableCell">
            <text:p><text:span text:style-name="Bold">Payload İçeriği</text:span></text:p>
          </table:table-cell>
          <table:table-cell table:style-name="TableCell">
            <text:p><text:span text:style-name="Italic">Mode‑S State Vector</text:span> (Versiyon 0–2):<text:span text:style-name="Normal"/>- <text:span text:style-name="Bold">Position</text:span>: Type Code + Latitude/Longitude (10‑bit mantıksal kodlama).<text:span text:style-name="Normal"/>- <text:span text:style-name="Bold">Altitude</text:span>: Barometric (pressure) veya GPS. <text:span text:style-name="Normal"/>- <text:span text:style-name="Bold">Velocity</text:span>: E/W, N/S, vertical rate; 4 bit yön + 12 bit hız. <text:span text:style-name="Normal"/> <text:span text:style-name="Italic">Target Status</text:span> (Versiyon 0–2):<text:span text:style-name="Normal"/>- Operational Mode, Capability Codes, Target State &amp; Status, NACp, etc.</text:p>
          </table:table-cell>
        </table:table-row>
        <table:table-row>
          <table:table-cell table:style-name="TableCell">
            <text:p><text:span text:style-name="Bold">Veri Çevirisi – Report Structure</text:span></text:p>
          </table:table-cell>
          <table:table-cell table:style-name="TableCell">
            <text:p>EuroCAE ED‑102B’deki “Table N‑5”, “N‑12”, “N‑15” vb. tablolar; <text:span text:style-name="Normal"/>• Mesaj alanları (ME) → Report Structure alanlarına eşleme.<text:span text:style-name="Normal"/>• Versiyon 0,1,2 için farklı “Report Structure” kodlamaları (örneğin “AA”, “CF”).</text:p>
          </table:table-cell>
        </table:table-row>
        <table:table-row>
          <table:table-cell table:style-name="TableCell">
            <text:p><text:span text:style-name="Bold">Validity &amp; Update Flags</text:span></text:p>
          </table:table-cell>
          <table:table-cell table:style-name="TableCell">
            <text:p>• <text:span text:style-name="Bold">Validity Flag</text:span>: 8 bit; her veri elemanının geçerliliğini gösterir. <text:span text:style-name="Normal"/>• <text:span text:style-name="Bold">Data‑Update Flag</text:span>: Versiyon 1+’de, verinin güncel olup olmadığını belirtir (Table 2‑154/155).</text:p>
          </table:table-cell>
        </table:table-row>
        <table:table-row>
          <table:table-cell table:style-name="TableCell">
            <text:p><text:span text:style-name="Bold">Adres Kaynakları &amp; Sınıflandırma</text:span></text:p>
          </table:table-cell>
          <table:table-cell table:style-name="TableCell">
            <text:p>• DF = 17 mesajları için “Address Source” = <text:span text:style-name="Italic">All Messages with DF=17</text:span>; <text:span text:style-name="Normal"/>• DF = 18 mesajları için “Address Source” = <text:span text:style-name="Italic">All Messages with DF=18</text:span> (CF).</text:p>
          </table:table-cell>
        </table:table-row>
        <table:table-row>
          <table:table-cell table:style-name="TableCell">
            <text:p><text:span text:style-name="Bold">İnterrogator Kodları &amp; Lockout</text:span></text:p>
          </table:table-cell>
          <table:table-cell table:style-name="TableCell">
            <text:p>EUROCONTROL Mode‑S kursunda açıklanan: <text:span text:style-name="Normal"/>• <text:span text:style-name="Bold">Interrogator Codes (ICs)</text:span> – 5 bit kod, belirli mesaj tiplerini sorgular. <text:span text:style-name="Normal"/>• <text:span text:style-name="Bold">Lockout</text:span> – Aynı IC’yi ardışık olarak kullanarak aynı uçuşu “kilitleme” mekanizması.</text:p>
          </table:table-cell>
        </table:table-row>
        <table:table-row>
          <table:table-cell table:style-name="TableCell">
            <text:p><text:span text:style-name="Bold">Kapsam Haritaları &amp; Alıcı/İnterrogator Konfigürasyonu</text:span></text:p>
          </table:table-cell>
          <table:table-cell table:style-name="TableCell">
            <text:p>• Kapsam haritaları, alıcının (radar) kapsama alanını gösterir. <text:span text:style-name="Normal"/>• Interrogator konfigürasyonları, IC’lerin sırası ve aralığıyla ilgili teknik yönergeler.</text:p>
          </table:table-cell>
        </table:table-row>
        <table:table-row>
          <table:table-cell table:style-name="TableCell">
            <text:p><text:span text:style-name="Bold">Mode‑S Specific Services (MSS)</text:span></text:p>
          </table:table-cell>
          <table:table-cell table:style-name="TableCell">
            <text:p><text:span text:style-name="Italic">Eurocontrol Mode S Specific Services</text:span> dokümanında tanımlanan: <text:span text:style-name="Normal"/>• <text:span text:style-name="Bold">SD Field</text:span> – Service Definition alanı; 16 bit.<text:span text:style-name="Normal"/>• <text:span text:style-name="Bold">Architecture</text:span> – SD, register allocation, data format ve kontrol parametreleri.</text:p>
          </table:table-cell>
        </table:table-row>
        <table:table-row>
          <table:table-cell table:style-name="TableCell">
            <text:p><text:span text:style-name="Bold">Register Allocation &amp; Data Formats</text:span></text:p>
          </table:table-cell>
          <table:table-cell table:style-name="TableCell">
            <text:p>• Transponder registers (ED‑102B Table N‑3/N‑4) – 112-bit mesajın hangi byte’larının hangi veri elemanlarını taşıdığı. <text:span text:style-name="Normal"/>• Veri biçimleri: <text:span text:style-name="Italic">discrete</text:span>, <text:span text:style-name="Italic">SM</text:span> (signed magnitude), <text:span text:style-name="Italic">two’s complement</text:span>.</text:p>
          </table:table-cell>
        </table:table-row>
        <table:table-row>
          <table:table-cell table:style-name="TableCell">
            <text:p><text:span text:style-name="Bold">Özel Kodlamalar</text:span></text:p>
          </table:table-cell>
          <table:table-cell table:style-name="TableCell">
            <text:p>• <text:span text:style-name="Bold">Type Code → Navigation Source</text:span> (Table N‑16).<text:span text:style-name="Normal"/>• <text:span text:style-name="Bold">Capability Class (CC)</text:span>, <text:span text:style-name="Bold">Operational Mode (OM)</text:span> ve <text:span text:style-name="Bold">True/Magnetic Heading</text:span> kodlamaları (Tables 2‑156–159).</text:p>
          </table:table-cell>
        </table:table-row>
        <table:table-row>
          <table:table-cell table:style-name="TableCell">
            <text:p><text:span text:style-name="Bold">Kullanım Alanları</text:span></text:p>
          </table:table-cell>
          <table:table-cell table:style-name="TableCell">
            <text:p>• <text:span text:style-name="Bold">ADS‑B</text:span> – uçuş izleme, çarpışma önleme. <text:span text:style-name="Normal"/>• <text:span text:style-name="Bold">TIS‑B / ADS‑R</text:span> – yer tabanlı trafik bilgisi ile uçaklara veri gönderimi. <text:span text:style-name="Normal"/>• <text:span text:style-name="Bold">Extended Squitter (ES) v1/v2</text:span> – farklı mesaj tipleri ve veri içerikleri.</text:p>
          </table:table-cell>
        </table:table-row>
        <table:table-row>
          <table:table-cell table:style-name="TableCell">
            <text:p><text:span text:style-name="Bold">Standartlar &amp; Referanslar</text:span></text:p>
          </table:table-cell>
          <table:table-cell table:style-name="TableCell">
            <text:p>• EuroCAE ED‑102B (2020).<text:span text:style-name="Normal"/>• EUROCONTROL “Principles of Mode S Operation”.<text:span text:style-name="Normal"/>• RTCA DO‑260C (Table N‑5, N‑12, N‑15 vb.).</text:p>
          </table:table-cell>
        </table:table-row>
        <table:table-row>
          <table:table-cell table:style-name="TableCell">
            <text:p/>
          </table:table-cell>
        </table:table-row>
      </table:table>
      <text:p/>
      <text:p>---</text:p>
      <text:p/>
      <text:h text:outline-level="3" text:style-name="Heading3">Özet</text:h>
      <text:p/>
      <text:p>Mode‑S, 1090 MHz frekansında çalışan iki yönlü bir iletişim protokolüdür. Mesajlar 112 bit uzunluğunda olup, DF, CA, AC ve payload alanlarından oluşur. Payload, mesaj tipine göre değişen veri elemanlarını taşır; örneğin Extended Squitter (DF = 17/18) mesajları uçuş durumu, konum, hız, yükseklik gibi bilgileri içerir. EuroCAE ED‑102B’deki “Table N” serisi, bu alanların report structure’lere nasıl eşlendiğini gösterir.</text:p>
      <text:p/>
      <text:p>Mesajların doğruluğu 24 bitlik parity ile sağlanır; ayrıca her veri elemanı için geçerlilik (Validity) ve güncelleme (Data‑Update) bayrakları bulunur. Adres kaynakları DF’ye göre belirlenir, bu sayede aynı uçuşun farklı mesaj tipleriyle gönderilen verileri birleştirilebilir.</text:p>
      <text:p/>
      <text:p>Mode‑S’in teknik altyapısı, interrogator kodları, lockout mekanizmaları ve kapsama haritalarıyla desteklenir. EUROCONTROL’un “Mode S Specific Services” dokümanı, SD alanı, register allocation ve veri formatlarını tanımlar; bu sayede farklı hizmetler (TIS‑B, ADS‑R vb.) aynı protokole entegre edilebilir.</text:p>
      <text:p/>
      <text:p>Sonuç olarak, Mode‑S hem uçuş izleme hem de hava trafik kontrolünde kritik bir rol oynar. Mesaj yapısı, veri elemanları ve teknik bileşenlerin net tanımları sayesinde sistemler arasında güvenilir, standartlaştırılmış iletişim sağlanır.</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styles>
    <style:style style:name="Title" style:family="paragraph" style:display-name="Title">
      <style:text-properties fo:font-size="18pt" fo:font-weight="bold"/>
      <style:paragraph-properties fo:text-align="center"/>
    </style:style>
    <style:style style:name="Question" style:family="text" style:display-name="Question">
      <style:text-properties fo:font-size="12pt" fo:font-weight="bold" fo:color="#2563EB"/>
    </style:style>
    <style:style style:name="Answer" style:family="text" style:display-name="Answer">
      <style:text-properties fo:font-size="11pt" fo:color="#1F2937"/>
    </style:style>
    <style:style style:name="Bold" style:family="text" style:display-name="Bold">
      <style:text-properties fo:font-weight="bold"/>
    </style:style>
    <style:style style:name="Italic" style:family="text" style:display-name="Italic">
      <style:text-properties fo:font-style="italic"/>
    </style:style>
    <style:style style:name="Code" style:family="text" style:display-name="Code">
      <style:text-properties fo:font-family="monospace" fo:font-size="10pt" fo:color="#DC2626"/>
    </style:style>
    <style:style style:name="Heading2" style:family="paragraph" style:display-name="Heading2">
      <style:text-properties fo:font-size="14pt" fo:font-weight="bold" fo:color="#1E40AF"/>
      <style:paragraph-properties fo:margin-bottom="0.2cm"/>
    </style:style>
    <style:style style:name="Heading3" style:family="paragraph" style:display-name="Heading3">
      <style:text-properties fo:font-size="12pt" fo:font-weight="bold" fo:color="#3B82F6"/>
    </style:style>
    <style:style style:name="Source" style:family="text" style:display-name="Source">
      <style:text-properties fo:font-size="10pt" fo:font-style="italic" fo:color="#6B7280"/>
    </style:style>
    <style:style style:name="Separator" style:family="paragraph" style:display-name="Separator">
      <style:paragraph-properties fo:text-align="center"/>
      <style:text-properties fo:color="#9CA3AF"/>
    </style:style>
    <style:style style:name="ListItem" style:family="paragraph" style:display-name="ListItem">
      <style:paragraph-properties fo:margin-left="0.5cm"/>
    </style:style>
    <style:style style:name="TableTitle" style:family="paragraph" style:display-name="TableTitle">
      <style:text-properties fo:font-size="12pt" fo:font-weight="bold" fo:color="#1E40AF"/>
      <style:paragraph-properties fo:margin-top="0.3cm" fo:margin-bottom="0.1cm"/>
    </style:style>
    <style:style style:name="TableNote" style:family="paragraph" style:display-name="TableNote">
      <style:text-properties fo:font-size="9pt" fo:font-style="italic" fo:color="#6B7280"/>
      <style:paragraph-properties fo:margin-top="0.1cm" fo:margin-bottom="0.3cm"/>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