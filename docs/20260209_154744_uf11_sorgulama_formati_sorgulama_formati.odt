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Table" style:family="table" style:display-name="Table">
      <style:text-properties fo:font-size="10pt"/>
    </style:style>
    <style:style style:name="TableCell" style:family="table-cell" style:display-name="TableCell">
      <style:paragraph-properties fo:margin="0.05cm"/>
      <style:text-properties fo:font-size="10pt"/>
    </style:style>
    <style:style style:name="TableHeaderCell" style:family="table-cell" style:display-name="TableHeaderCell">
      <style:paragraph-properties fo:margin="0.05cm" fo:background-color="#E5E7EB"/>
      <style:text-properties fo:font-size="10pt" fo:font-weight="bold"/>
    </style:style>
    <style:style style:name="TableColumn" style:family="table-column" style:display-name="TableColumn">
      <style:text-properties fo:font-size="10pt"/>
    </style:style>
  </office:automatic-styles>
  <office:body>
    <office:text>
      <text:h text:outline-level="1" text:style-name="Title">RAG Chat Konuşması</text:h>
      <text:p/>
      <text:p>Tarih: 09.02.2026 15:47</text:p>
      <text:p>Toplam Soru-Cevap: 1</text:p>
      <text:p>Model: gpt-oss-20b (gpt-oss-20b)</text:p>
      <text:p/>
      <text:p>═══════════════════════════════════════</text:p>
      <text:p><text:span text:style-name="Question">PERFORMANS METRİKLERİ</text:span></text:p>
      <text:p>═══════════════════════════════════════</text:p>
      <text:p>Çalışma Modu: 🧠 Agentic</text:p>
      <text:p>Üretim Süresi: 19.51 saniye</text:p>
      <text:p>Token Kullanımı: 12,694 / 2,108 (Giriş/Çıkış)</text:p>
      <text:p>Toplam Token: 14,802</text:p>
      <text:p>════════════════════════════════════════════════════════════</text:p>
      <text:p/>
      <text:p>─── Soru 1 ───</text:p>
      <text:p/>
      <text:p>⏰ 09.02.2026 15:47:44 | 🧠 Mod: AGENTIC</text:p>
      <text:p/>
      <text:p><text:span text:style-name="Question">❓ SORU: </text:span><text:span text:style-name="Answer">UF=11 sorgulama formatı hangi durumlarda kullanılır?</text:span></text:p>
      <text:p/>
      <text:p><text:span text:style-name="Source">📚 KAYNAKLAR:</text:span></text:p>
      <text:p><text:span text:style-name="Source">  • Annex 10 Aeronautical Telecommunications Volume IV — Surveillance and Collision Avoidance Systems.pdf (Sayfa 42) - Benzerlik: 0.630</text:span></text:p>
      <text:p><text:span text:style-name="Source">  • ED-73F - MOPS for Secondary Surveillance Radar Mode S.pdf (Sayfa 218) - Benzerlik: 0.609</text:span></text:p>
      <text:p><text:span text:style-name="Source">  • EUROCONTROL_Mode_S_Course_Complete.pdf (Sayfa 238) - Benzerlik: 0.609</text:span></text:p>
      <text:p><text:span text:style-name="Source">  • ED-73F - MOPS for Secondary Surveillance Radar Mode S.pdf (Sayfa 218) - Benzerlik: 0.609</text:span></text:p>
      <text:p><text:span text:style-name="Source">  • DO260-C.pdf (Sayfa 1577) - Benzerlik: 0.607</text:span></text:p>
      <text:p><text:span text:style-name="Source">  • ED-73F - MOPS for Secondary Surveillance Radar Mode S.pdf (Sayfa 63) - Benzerlik: 0.599</text:span></text:p>
      <text:p><text:span text:style-name="Source">  • ED-73F - MOPS for Secondary Surveillance Radar Mode S.pdf (Sayfa 626) - Benzerlik: 0.594</text:span></text:p>
      <text:p><text:span text:style-name="Source">  • ED-73F - MOPS for Secondary Surveillance Radar Mode S.pdf (Sayfa 239) - Benzerlik: 0.592</text:span></text:p>
      <text:p><text:span text:style-name="Source">  • ED-73F - MOPS for Secondary Surveillance Radar Mode S.pdf (Sayfa 197) - Benzerlik: 0.590</text:span></text:p>
      <text:p><text:span text:style-name="Source">  • ED-73F - MOPS for Secondary Surveillance Radar Mode S.pdf (Sayfa 237) - Benzerlik: 0.589</text:span></text:p>
      <text:p><text:span text:style-name="Source">  • Annex 10 Aeronautical Telecommunications Volume IV — Surveillance and Collision Avoidance Systems.pdf (Sayfa 42) - Benzerlik: 0.589</text:span></text:p>
      <text:p><text:span text:style-name="Source">  • ED-73F - MOPS for Secondary Surveillance Radar Mode S.pdf (Sayfa 626) - Benzerlik: 0.586</text:span></text:p>
      <text:p><text:span text:style-name="Source">  • Annex 10 Aeronautical Telecommunications Volume IV — Surveillance and Collision Avoidance Systems.pdf (Sayfa 44) - Benzerlik: 0.585</text:span></text:p>
      <text:p><text:span text:style-name="Source">  • Annex 10 Aeronautical Telecommunications Volume IV — Surveillance and Collision Avoidance Systems.pdf (Sayfa 34) - Benzerlik: 0.585</text:span></text:p>
      <text:p><text:span text:style-name="Source">  • Annex 10 Aeronautical Telecommunications Volume IV — Surveillance and Collision Avoidance Systems.pdf (Sayfa 47) - Benzerlik: 0.584</text:span></text:p>
      <text:p><text:span text:style-name="Source">  • EUROCONTROL_Mode_S_Course_Complete.pdf (Sayfa 209) - Benzerlik: 0.582</text:span></text:p>
      <text:p><text:span text:style-name="Source">  • ED-73F - MOPS for Secondary Surveillance Radar Mode S.pdf (Sayfa 624) - Benzerlik: 0.581</text:span></text:p>
      <text:p><text:span text:style-name="Source">  • DO260-C.pdf (Sayfa 1621) - Benzerlik: 0.579</text:span></text:p>
      <text:p><text:span text:style-name="Source">  • ED-73F - MOPS for Secondary Surveillance Radar Mode S.pdf (Sayfa 218) - Benzerlik: 0.578</text:span></text:p>
      <text:p><text:span text:style-name="Source">  • ED-102B.pdf (Sayfa 1381) - Benzerlik: 0.576</text:span></text:p>
      <text:p/>
      <text:p><text:span text:style-name="Question">💬 CEVAP:</text:span></text:p>
      <text:p/>
      <text:h text:outline-level="2" text:style-name="Heading2">UF = 11 sorgulama formatı (Mode S‑only all‑call) hangi durumlarda kullanılır?</text:h>
      <text:p/>
      <table:table table:style-name="Table">
        <table:table-column table:style-name="TableColumn"/>
        <table:table-column table:style-name="TableColumn"/>
        <table:table-row>
          <table:table-cell table:style-name="TableHeaderCell">
            <text:p>Durum</text:p>
          </table:table-cell>
          <table:table-cell table:style-name="TableHeaderCell">
            <text:p>Açıklama</text:p>
          </table:table-cell>
        </table:table-row>
        <table:table-row>
          <table:table-cell table:style-name="TableCell">
            <text:p><text:span text:style-name="Bold">Tüm Mode S hedeflerinin tespiti (acquisition)</text:span></text:p>
          </table:table-cell>
          <table:table-cell table:style-name="TableCell">
            <text:p>Bir radardan “tüm” Mode S transponder’ları taramak için, yani henüz adresi bilinmeyen uçakları bulmak amacıyla.</text:p>
          </table:table-cell>
        </table:table-row>
        <table:table-row>
          <table:table-cell table:style-name="TableCell">
            <text:p><text:span text:style-name="Bold">Broadcast adresiyle gönderim</text:span></text:p>
          </table:table-cell>
          <table:table-cell table:style-name="TableCell">
            <text:p>Sorgulama adresi 24 adet ‘1’ (111…111) olarak ayarlanır; bu, beam içinde bulunan tüm Mode S transponder’lara “broadcast” yapılmasını sağlar.</text:p>
          </table:table-cell>
        </table:table-row>
        <table:table-row>
          <table:table-cell table:style-name="TableCell">
            <text:p><text:span text:style-name="Bold">Kısa (56 bit) sorgulama</text:span></text:p>
          </table:table-cell>
          <table:table-cell table:style-name="TableCell">
            <text:p>UF = 11, 56‑bit uzunlukta kısa bir sorgulamadır.</text:p>
          </table:table-cell>
        </table:table-row>
        <table:table-row>
          <table:table-cell table:style-name="TableCell">
            <text:p><text:span text:style-name="Bold">DF = 11 yanıtı beklenir</text:span></text:p>
          </table:table-cell>
          <table:table-cell table:style-name="TableCell">
            <text:p>Sorgulama kabul edilirse yanıt DF = 11 formatında gönderilir.</text:p>
          </table:table-cell>
        </table:table-row>
        <table:table-row>
          <table:table-cell table:style-name="TableCell">
            <text:p><text:span text:style-name="Bold">Çok‑lateralasyon sistemlerinde yerel kullanım</text:span></text:p>
          </table:table-cell>
          <table:table-cell table:style-name="TableCell">
            <text:p>Multi‑lateration (MLAT) ekipmanları, yalnızca yerel otoriteyle anlaşılmışsa ve “lockout override” ile sınırlıysa UF = 11 kullanabilir.</text:p>
          </table:table-cell>
        </table:table-row>
        <table:table-row>
          <table:table-cell table:style-name="TableCell">
            <text:p><text:span text:style-name="Bold">Test/Doğrulama prosedürleri</text:span></text:p>
          </table:table-cell>
          <table:table-cell table:style-name="TableCell">
            <text:p>Transponder’ın “on‑ground” durumunda yanıt vermemesini doğrulamak için, ED‑73F testlerinde UF = 11 sorgulamaları yapılır.</text:p>
          </table:table-cell>
        </table:table-row>
        <table:table-row>
          <table:table-cell table:style-name="TableCell">
            <text:p/>
          </table:table-cell>
        </table:table-row>
      </table:table>
      <text:p/>
      <text:h text:outline-level="3" text:style-name="Heading3">Teknik gereklilikler</text:h>
      <text:p/>
      <text:p>1. <text:span text:style-name="Bold">Adres</text:span>: Sorgulamada adres alanı 24 adet ‘1’ (111…111) olmalıdır.</text:p>
      <text:p>2. <text:span text:style-name="Bold">PR (Probability of Reply)</text:span>: PR kodu, yanıt olasılığını belirler; örneğin PR = 0 → %100, PR = 1 → %50 vb.</text:p>
      <text:p>3. <text:span text:style-name="Bold">IC/CL</text:span>: Lockout durumunu kontrol eder.  UF = 11 sorgulaması kabul edilmezse (ör. transponder lock‑out veya “on‑ground” ise) yanıt gönderilmez.</text:p>
      <text:p>4. <text:span text:style-name="Bold">Vertical Status</text:span>: Transponder “airborne” ve lock‑out koşulu sağlanmadığında yanıt verilir; “on‑ground” olduğunda yanıt verilmemelidir.</text:p>
      <text:p/>
      <text:h text:outline-level="3" text:style-name="Heading3">Özet</text:h>
      <text:p/>
      <text:p>- <text:span text:style-name="Bold">UF = 11</text:span>, yalnızca Mode S transponder’ları için “all‑call” (tüm hedefleri tarama) amacıyla kullanılır.</text:p>
      <text:p>- Sorgulama adresi 24 adet ‘1’ olmalı, yanıt formatı DF = 11’dir.</text:p>
      <text:p>- Multi‑lateration sistemlerinde yalnızca yerel otoriteyle anlaşılmışsa ve lockout override ile sınırlıysa kullanılabilir.</text:p>
      <text:p>- Diğer tüm durumlarda (Mode A/C/S all‑call, ileri veri iletişimi vb.) UF = 11 yerine uygun başka uf formatları tercih edilmelidir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le" style:family="paragraph" style:display-name="Title">
      <style:text-properties fo:font-size="18pt" fo:font-weight="bold"/>
      <style:paragraph-properties fo:text-align="center"/>
    </style:style>
    <style:style style:name="Question" style:family="text" style:display-name="Question">
      <style:text-properties fo:font-size="12pt" fo:font-weight="bold" fo:color="#2563EB"/>
    </style:style>
    <style:style style:name="Answer" style:family="text" style:display-name="Answer">
      <style:text-properties fo:font-size="11pt" fo:color="#1F2937"/>
    </style:style>
    <style:style style:name="Bold" style:family="text" style:display-name="Bold">
      <style:text-properties fo:font-weight="bold"/>
    </style:style>
    <style:style style:name="Italic" style:family="text" style:display-name="Italic">
      <style:text-properties fo:font-style="italic"/>
    </style:style>
    <style:style style:name="Code" style:family="text" style:display-name="Code">
      <style:text-properties fo:font-family="monospace" fo:font-size="10pt" fo:color="#DC2626"/>
    </style:style>
    <style:style style:name="Heading2" style:family="paragraph" style:display-name="Heading2">
      <style:text-properties fo:font-size="14pt" fo:font-weight="bold" fo:color="#1E40AF"/>
      <style:paragraph-properties fo:margin-bottom="0.2cm"/>
    </style:style>
    <style:style style:name="Heading3" style:family="paragraph" style:display-name="Heading3">
      <style:text-properties fo:font-size="12pt" fo:font-weight="bold" fo:color="#3B82F6"/>
    </style:style>
    <style:style style:name="Source" style:family="text" style:display-name="Source">
      <style:text-properties fo:font-size="10pt" fo:font-style="italic" fo:color="#6B7280"/>
    </style:style>
    <style:style style:name="Separator" style:family="paragraph" style:display-name="Separator">
      <style:paragraph-properties fo:text-align="center"/>
      <style:text-properties fo:color="#9CA3AF"/>
    </style:style>
    <style:style style:name="ListItem" style:family="paragraph" style:display-name="ListItem">
      <style:paragraph-properties fo:margin-left="0.5cm"/>
    </style:style>
    <style:style style:name="TableTitle" style:family="paragraph" style:display-name="TableTitle">
      <style:text-properties fo:font-size="12pt" fo:font-weight="bold" fo:color="#1E40AF"/>
      <style:paragraph-properties fo:margin-top="0.3cm" fo:margin-bottom="0.1cm"/>
    </style:style>
    <style:style style:name="TableNote" style:family="paragraph" style:display-name="TableNote">
      <style:text-properties fo:font-size="9pt" fo:font-style="italic" fo:color="#6B7280"/>
      <style:paragraph-properties fo:margin-top="0.1cm" fo:margin-bottom="0.3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