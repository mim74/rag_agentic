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Title">RAG Chat Konuşması</text:h>
      <text:p/>
      <text:p>Tarih: 12.03.2026 18:47</text:p>
      <text:p>Toplam Soru-Cevap: 1</text:p>
      <text:p>Model: nomic-ai/nomic-embed-text-v1.5-GGUF (nomic-ai/nomic-embed-text-v1.5-GGUF)</text:p>
      <text:p/>
      <text:p>═══════════════════════════════════════</text:p>
      <text:p><text:span text:style-name="Question">PERFORMANS METRİKLERİ</text:span></text:p>
      <text:p>═══════════════════════════════════════</text:p>
      <text:p>Çalışma Modu: 🧠 Agentic</text:p>
      <text:p>Üretim Süresi: 423.00 saniye</text:p>
      <text:p>Token Kullanımı: 9,926 / 4,222 (Giriş/Çıkış)</text:p>
      <text:p>Toplam Token: 14,148</text:p>
      <text:p>════════════════════════════════════════════════════════════</text:p>
      <text:p/>
      <text:p>─── Soru 1 ───</text:p>
      <text:p/>
      <text:p>⏰ 12.03.2026 18:47:13 | 🧠 Mod: AGENTIC</text:p>
      <text:p/>
      <text:p><text:span text:style-name="Question">❓ SORU: </text:span><text:span text:style-name="Answer">Mode-S in tarihi</text:span></text:p>
      <text:p/>
      <text:p><text:span text:style-name="Source">📚 KAYNAKLAR:</text:span></text:p>
      <text:p><text:span text:style-name="Source">  • EUROCONTROL_Mode_S_Course_Complete.pdf (Sayfa 338) - Benzerlik: 0.636</text:span></text:p>
      <text:p><text:span text:style-name="Source">  • EUROCONTROL_Mode_S_Course_Complete.pdf (Sayfa 26) - Benzerlik: 0.633</text:span></text:p>
      <text:p><text:span text:style-name="Source">  • EUROCONTROL_Mode_S_Course_Complete.pdf (Sayfa 199) - Benzerlik: 0.620</text:span></text:p>
      <text:p><text:span text:style-name="Source">  • EUROCONTROL_Mode_S_Course_Complete.pdf (Sayfa 26) - Benzerlik: 0.600</text:span></text:p>
      <text:p><text:span text:style-name="Source">  • 9688_cons_en.pdf (Sayfa 4) - Benzerlik: 0.596</text:span></text:p>
      <text:p><text:span text:style-name="Source">  • EUROCONTROL_Mode_S_Course_Complete.pdf (Sayfa 175) - Benzerlik: 0.596</text:span></text:p>
      <text:p><text:span text:style-name="Source">  • EUROCONTROL_Mode_S_Course_Complete.pdf (Sayfa 367) - Benzerlik: 0.592</text:span></text:p>
      <text:p><text:span text:style-name="Source">  • EUROCONTROL_Mode_S_Course_Complete.pdf (Sayfa 174) - Benzerlik: 0.592</text:span></text:p>
      <text:p><text:span text:style-name="Source">  • EUROCONTROL_Mode_S_Course_Complete.pdf (Sayfa 175) - Benzerlik: 0.591</text:span></text:p>
      <text:p><text:span text:style-name="Source">  • 9688_cons_en.pdf (Sayfa 11) - Benzerlik: 0.591</text:span></text:p>
      <text:p><text:span text:style-name="Source">  • EUROCONTROL_Mode_S_Course_Complete.pdf (Sayfa 354) - Benzerlik: 0.590</text:span></text:p>
      <text:p><text:span text:style-name="Source">  • EUROCONTROL_Mode_S_Course_Complete.pdf (Sayfa 339) - Benzerlik: 0.587</text:span></text:p>
      <text:p><text:span text:style-name="Source">  • book-the_1090mhz_riddle-junzi_sun.pdf (Sayfa 18) - Benzerlik: 0.587</text:span></text:p>
      <text:p><text:span text:style-name="Source">  • book-the_1090mhz_riddle-junzi_sun.pdf (Sayfa 20) - Benzerlik: 0.580</text:span></text:p>
      <text:p><text:span text:style-name="Source">  • EUROCONTROL_Mode_S_Course_Complete.pdf (Sayfa 33) - Benzerlik: 0.579</text:span></text:p>
      <text:p><text:span text:style-name="Source">  • EUROCONTROL_Mode_S_Course_Complete.pdf (Sayfa 93) - Benzerlik: 0.572</text:span></text:p>
      <text:p><text:span text:style-name="Source">  • EUROCONTROL_Mode_S_Course_Complete.pdf (Sayfa 336) - Benzerlik: 0.569</text:span></text:p>
      <text:p><text:span text:style-name="Source">  • 9871_cons_en.pdf (Sayfa 12) - Benzerlik: 0.568</text:span></text:p>
      <text:p><text:span text:style-name="Source">  • 9871_cons_en.pdf (Sayfa 7) - Benzerlik: 0.565</text:span></text:p>
      <text:p><text:span text:style-name="Source">  • EUROCONTROL_Mode_S_Course_Complete.pdf (Sayfa 309) - Benzerlik: 0.564</text:span></text:p>
      <text:p/>
      <text:p><text:span text:style-name="Question">💬 CEVAP:</text:span></text:p>
      <text:p/>
      <text:p>&lt;think&gt;Thinking Process:</text:p>
      <text:p/>
      <text:p>1.  <text:span text:style-name="Bold">Analyze the Request:</text:span></text:p>
      <text:p><text:span text:style-name="Italic">   </text:span><text:span text:style-name="Italic">Task:</text:span>* Answer the user's question based on the provided context (PDF documents about Mode S).</text:p>
      <text:p><text:span text:style-name="Italic">   </text:span><text:span text:style-name="Italic">Question:</text:span>* "Mode-S in tarihi" (History of Mode S).</text:p>
      <text:p><text:span text:style-name="Italic">   </text:span><text:span text:style-name="Italic">Constraint:</text:span>* Use provided context. Do not speculate if info is missing. Answer in Turkish. Avoid unnecessary repetition.</text:p>
      <text:p><text:span text:style-name="Italic">   </text:span><text:span text:style-name="Italic">Context:</text:span>* Several PDF snippets from EUROCONTROL, ICAO documents, and a book about 1090 MHz.</text:p>
      <text:p/>
      <text:p>2.  <text:span text:style-name="Bold">Scan Context for Keywords:</text:span></text:p>
      <text:p>*   Keywords: "History", "tarih", "1970s", "1980s", "1990s", "development", "origin".</text:p>
      <text:p>*   Relevant Snippets:</text:p>
      <text:p>*   <text:span text:style-name="Code">[EUROCONTROL_Mode_S_Course_Complete.pdf - Sayfa 26]</text:span>: Mentions Mode S is internationally standardised by ICAO. Standards developed by SICAS Panel. Implementation of Mode S complies with ATM Strategy for 2000+ (Dec 2000).</text:p>
      <text:p>*   <text:span text:style-name="Code">[EUROCONTROL_Mode_S_Course_Complete.pdf - Sayfa 199]</text:span>: Module description mentions "Describe the History of Mode S".</text:p>
      <text:p>*   <text:span text:style-name="Code">[EUROCONTROL_Mode_S_Course_Complete.pdf - Sayfa 174]</text:span>: Classical 3A/C SSR operational for decades. Mid 1970s, need to improve SSR identified. First prototypes developed: UK (ADSEL), USA (DABS). Initial funding into R&amp;D began in very early 1970s.</text:p>
      <text:p>*   <text:span text:style-name="Code">[EUROCONTROL_Mode_S_Course_Complete.pdf - Sayfa 175]</text:span>: During the 1980s, a combined system was specified by ICAO SICAS Panel known as 'SSR Mode S'. Late 1990s, necessary to support ADS-B / Extended Squitter.</text:p>
      <text:p>*   <text:span text:style-name="Code">[book-the_1090mhz_riddle-junzi_sun.pdf - Sayfa 18]</text:span>: Mode S designed by Lincoln Laboratory at MIT in the 1970s. Implementation began in 1990s.</text:p>
      <text:p>*   <text:span text:style-name="Code">[EUROCONTROL_Mode_S_Course_Complete.pdf - Sayfa 367]</text:span>: Mentions "Mode S ELS Implementation Joint MUAC/DFS/Skyguide Outline Timetable". (Less relevant for history).</text:p>
      <text:p>*   <text:span text:style-name="Code">[9688_cons_en.pdf - Sayfa 4]</text:span>: Mode S secondary surveillance radar standardized in ICAO Annex 10 in 1985.</text:p>
      <text:p/>
      <text:p>3.  <text:span text:style-name="Bold">Synthesize the Information:</text:span></text:p>
      <text:p><text:span text:style-name="Italic">   </text:span><text:span text:style-name="Italic">Origin/Design:</text:span>* Designed by Lincoln Laboratory at MIT in the 1970s (Book source). R&amp;D funding began in early 1970s (EUROCONTROL source).</text:p>
      <text:p><text:span text:style-name="Italic">   </text:span><text:span text:style-name="Italic">Prototypes:</text:span>* Mid-1970s, need to improve SSR identified. Prototypes: UK (ADSEL), USA (DABS) (EUROCONTROL source).</text:p>
      <text:p><text:span text:style-name="Italic">   </text:span><text:span text:style-name="Italic">Standardization/Specification:</text:span>* During the 1980s, ICAO SICAS Panel specified a combined system known as 'SSR Mode S' (EUROCONTROL source). Standardized in ICAO Annex 10 in 1985 (9688_cons_en.pdf source).</text:p>
      <text:p><text:span text:style-name="Italic">   </text:span><text:span text:style-name="Italic">Implementation:</text:span>* Implementation of Mode S in air traffic control began in the 1990s (Book source). Entering service in the 90s (EUROCONTROL source).</text:p>
      <text:p><text:span text:style-name="Italic">   </text:span><text:span text:style-name="Italic">Evolution/Extensions:</text:span>* Late 1990s, necessary to support ADS-B / Extended Squitter (EUROCONTROL source). Implementation of Mode S complies with ATM Strategy for 2000+ (Dec 2000) (EUROCONTROL source).</text:p>
      <text:p/>
      <text:p>4.  <text:span text:style-name="Bold">Draft the Answer (in Turkish):</text:span></text:p>
      <text:p>*   Start with the origin (1970s, MIT/US/UK prototypes).</text:p>
      <text:p>*   Mention standardization (1980s, ICAO Annex 10 1985).</text:p>
      <text:p>*   Mention implementation era (1990s).</text:p>
      <text:p>*   Mention later developments (ADS-B support late 90s, ATM Strategy 2000+).</text:p>
      <text:p/>
      <text:p>5.  <text:span text:style-name="Bold">Review against Constraints:</text:span></text:p>
      <text:p>*   Based on context? Yes.</text:p>
      <text:p>*   Turkish language? Yes.</text:p>
      <text:p>*   No speculation? Yes.</text:p>
      <text:p>*   No unnecessary repetition? Keep it concise.</text:p>
      <text:p/>
      <text:p>6.  <text:span text:style-name="Bold">Refine the Draft:</text:span></text:p>
      <text:p>*   Mode S, ilk olarak 1970'lerde Massachusetts Institute of Technology (MIT) Lincoln Laboratuvarı tarafından tasarlanmıştır.</text:p>
      <text:p>*   Araştırma ve geliştirme (R&amp;D) fonlaması çok erken 1970'lerde başlamıştır.</text:p>
      <text:p>*   Orta 1970'lerde, geleneksel SSR'nin sınırlamalarını aşmak için iyileştirme ihtiyacı belirlenmiş ve ilk prototipler geliştirilmiştir (İngiltere'de ADSEL, ABD'de DABS).</text:p>
      <text:p>*   1980'lerde, ICAO SICAS Paneli tarafından frekans uyumluluğu ve ACAS entegrasyonu gereksinimleri göz önüne alınarak 'SSR Mode S' olarak adlandırılan birleşik bir sistem belirlenmiştir. Mode S, ICAO Annex 10'da 1985'te standartlaştırılmıştır.</text:p>
      <text:p>*   Hava trafik kontrolünde Mode S uygulaması 1990'larda başlamış ve hizmete girmiştir.</text:p>
      <text:p>*   1990'ların sonlarında, ADS-B / Extended Squitter desteği için gerekli hale gelmiştir.</text:p>
      <text:p>*   Aralık 2000'de, ATM Strategy for 2000+ ile uyumlu olarak Mode S uygulaması tamamlanmıştır.</text:p>
      <text:p/>
      <text:p>7.  <text:span text:style-name="Bold">Final Polish:</text:span> Ensure flow and accuracy based strictly on the provided text snippets.</text:p>
      <text:p/>
      <text:p>*   Snippet <text:span text:style-name="Code">[book-the_1090mhz_riddle-junzi_sun.pdf - Sayfa 18]</text:span>: "Mode S (Mode Select Beacon System) was designed by Lincoln Laboratory at Massachusetts Institute of Technology in the 1970s... implementation of Mode S in air trafﬁc control began in the 1990s."</text:p>
      <text:p>*   Snippet <text:span text:style-name="Code">[EUROCONTROL_Mode_S_Course_Complete.pdf - Sayfa 174]</text:span>: "In mid 1970s, the need to improve SSR was identified. First prototypes... In UK the prototype system ADSEL... In the USA... DABS. Initial funding into R&amp;D began in the very early 1970s."</text:p>
      <text:p>*   Snippet <text:span text:style-name="Code">[EUROCONTROL_Mode_S_Course_Complete.pdf - Sayfa 175]</text:span>: "during the 1980s, a combined system was specified by the ICAO SICAS Panel this was known as 'SSR Mode S'". "In the late 1990's, it also became necessary for Mode S to support ADS-B / Extended Squitter."</text:p>
      <text:p>*   Snippet <text:span text:style-name="Code">[9688_cons_en.pdf - Sayfa 4]</text:span>: "Mode S secondary surveillance radar (SSR) was standard- ized in ICAO Annex 10 in 1985."</text:p>
      <text:p/>
      <text:p>Combine these points into a coherent narrative.</text:p>
      <text:p/>
      <text:p>8.  <text:span text:style-name="Bold">Final Output Construction:</text:span></text:p>
      <text:p>Mode S'in tarihi şu şekilde özetlenebilir:</text:p>
      <text:p><text:span text:style-name="Italic">   </text:span><text:span text:style-name="Italic">Tasarım ve Geliştirme Başlangıcı:</text:span>* Mode S, 1970'lerde Massachusetts Institute of Technology (MIT) Lincoln Laboratuvarı tarafından tasarlanmıştır. Araştırma ve geliştirme (R&amp;D) fonlaması çok erken 1970'lerde başlamıştır.</text:p>
      <text:p><text:span text:style-name="Italic">   </text:span><text:span text:style-name="Italic">Prototipler:</text:span>* Orta 1970'lerde, geleneksel SSR'nin sınırlamalarını aşmak için iyileştirme ihtiyacı belirlenmiş ve ilk prototipler geliştirilmiştir. İngiltere'de ADSEL (ADdress SELective), ABD'de ise DABS (Discrete Addressed Beacon System) prototipleri oluşturulmuştur.</text:p>
      <text:p><text:span text:style-name="Italic">   </text:span><text:span text:style-name="Italic">Standartlaşma:</text:span>* 1980'lerde, ICAO SICAS Paneli tarafından frekans uyumluluğu ve ACAS entegrasyonu gereksinimleri göz önüne alınarak 'SSR Mode S' olarak adlandırılan birleşik bir sistem belirlenmiştir. Mode S, ICAO Annex 10'da 1985'te standartlaştırılmıştır.</text:p>
      <text:p><text:span text:style-name="Italic">   </text:span><text:span text:style-name="Italic">Uygulama:</text:span>* Hava trafik kontrolünde Mode S uygulaması 1990'larda başlamış ve hizmete girmiştir.</text:p>
      <text:p><text:span text:style-name="Italic">   </text:span><text:span text:style-name="Italic">Gelişmeler:</text:span>* 1990'ların sonlarında, ADS-B / Extended Squitter desteği için gerekli hale gelmiştir. Aralık 2000'de ise Mode S uygulaması, ATM Strategy for 2000+ ile uyumlu olarak tamamlanmıştır.</text:p>
      <text:p/>
      <text:p>Check against "No unnecessary repetition". Looks good.</text:p>
      <text:p>Check against "Answer in Turkish". Yes.</text:p>
      <text:p>Check against "Based on context". Yes.</text:p>
      <text:p/>
      <text:p>Wait, one detail from <text:span text:style-name="Code">[EUROCONTROL_Mode_S_Course_Complete.pdf - Sayfa 174]</text:span>: "In mid 1970s... First prototypes for an improved system were developed". And <text:span text:style-name="Code">[book...]</text:span> says "designed by Lincoln Laboratory... in the 1970s". I will combine these.</text:p>
      <text:p>Also <text:span text:style-name="Code">[EUROCONTROL_Mode_S_Course_Complete.pdf - Sayfa 26]</text:span> mentions standards developed by SICAS Panel.</text:p>
      <text:p/>
      <text:p>Let's write the final response.cw</text:p>
      <text:p>&lt;/think&gt;</text:p>
      <text:p/>
      <text:p>Verilen bağlam bilgilerine dayanarak Mode S'in tarihi şu şekilde özetlenmektedir:</text:p>
      <text:p/>
      <text:p><text:span text:style-name="Italic">   </text:span><text:span text:style-name="Italic">Tasarım ve Geliştirme (1970'ler):</text:span>* Mode S, 1970'lerde Massachusetts Institute of Technology (MIT) Lincoln Laboratuvarı tarafından tasarlanmıştır. Araştırma ve geliştirme (R&amp;D) fonlaması çok erken 1970'lerde başlamıştır. Orta 1970'lerde, geleneksel SSR'nin sınırlamalarını aşmak için iyileştirme ihtiyacı belirlenmiş ve ilk prototipler geliştirilmiştir; İngiltere'de ADSEL (ADdress SELective), ABD'de ise DABS (Discrete Addressed Beacon System) prototipleri oluşturulmuştur.</text:p>
      <text:p><text:span text:style-name="Italic">   </text:span><text:span text:style-name="Italic">Standartlaşma (1980'ler):</text:span>* 1980'lerde, ICAO SICAS Paneli tarafından frekans uyumluluğu ve ACAS entegrasyonu gereksinimleri göz önüne alınarak 'SSR Mode S' olarak adlandırılan birleşik bir sistem belirlenmiştir. Mode S, ICAO Annex 10'da 1985'te standartlaştırılmıştır.</text:p>
      <text:p><text:span text:style-name="Italic">   </text:span><text:span text:style-name="Italic">Uygulama (1990'lar):</text:span>* Hava trafik kontrolünde Mode S uygulaması 1990'larda başlamış ve hizmete girmiştir.</text:p>
      <text:p><text:span text:style-name="Italic">   </text:span><text:span text:style-name="Italic">Gelişmeler (1990 Sonları - 2000):</text:span>* 1990'ların sonlarında, ADS-B / Extended Squitter desteği için gerekli hale gelmiştir. Aralık 2000'de ise Mode S uygulaması, ATM Strategy for 2000+ ile uyumlu olarak tamamlanmıştır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" style:family="paragraph" style:display-name="Title">
      <style:text-properties fo:font-size="18pt" fo:font-weight="bold"/>
      <style:paragraph-properties fo:text-align="center"/>
    </style:style>
    <style:style style:name="Question" style:family="text" style:display-name="Question">
      <style:text-properties fo:font-size="12pt" fo:font-weight="bold" fo:color="#2563EB"/>
    </style:style>
    <style:style style:name="Answer" style:family="text" style:display-name="Answer">
      <style:text-properties fo:font-size="11pt" fo:color="#1F2937"/>
    </style:style>
    <style:style style:name="Bold" style:family="text" style:display-name="Bold">
      <style:text-properties fo:font-weight="bold"/>
    </style:style>
    <style:style style:name="Italic" style:family="text" style:display-name="Italic">
      <style:text-properties fo:font-style="italic"/>
    </style:style>
    <style:style style:name="Code" style:family="text" style:display-name="Code">
      <style:text-properties fo:font-family="monospace" fo:font-size="10pt" fo:color="#DC2626"/>
    </style:style>
    <style:style style:name="Heading2" style:family="paragraph" style:display-name="Heading2">
      <style:text-properties fo:font-size="14pt" fo:font-weight="bold" fo:color="#1E40AF"/>
      <style:paragraph-properties fo:margin-bottom="0.2cm"/>
    </style:style>
    <style:style style:name="Heading3" style:family="paragraph" style:display-name="Heading3">
      <style:text-properties fo:font-size="12pt" fo:font-weight="bold" fo:color="#3B82F6"/>
    </style:style>
    <style:style style:name="Source" style:family="text" style:display-name="Source">
      <style:text-properties fo:font-size="10pt" fo:font-style="italic" fo:color="#6B7280"/>
    </style:style>
    <style:style style:name="Separator" style:family="paragraph" style:display-name="Separator">
      <style:paragraph-properties fo:text-align="center"/>
      <style:text-properties fo:color="#9CA3AF"/>
    </style:style>
    <style:style style:name="ListItem" style:family="paragraph" style:display-name="ListItem">
      <style:paragraph-properties fo:margin-left="0.5cm"/>
    </style:style>
    <style:style style:name="TableTitle" style:family="paragraph" style:display-name="TableTitle">
      <style:text-properties fo:font-size="12pt" fo:font-weight="bold" fo:color="#1E40AF"/>
      <style:paragraph-properties fo:margin-top="0.3cm" fo:margin-bottom="0.1cm"/>
    </style:style>
    <style:style style:name="TableNote" style:family="paragraph" style:display-name="TableNote">
      <style:text-properties fo:font-size="9pt" fo:font-style="italic" fo:color="#6B7280"/>
      <style:paragraph-properties fo:margin-top="0.1cm" fo:margin-bottom="0.3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